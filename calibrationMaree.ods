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54cm" fo:break-before="auto" style:use-optimal-row-height="true"/>
    </style:style>
    <style:style style:name="ro2" style:family="table-row">
      <style:table-row-properties style:row-height="1.621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1.16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<text:a xlink:href="https://maree.info/33?d=202605080" xlink:type="simple">Ven.08</text:a></text:p>
          </table:table-cell>
          <table:table-cell table:style-name="ce2" office:value-type="string" calcext:value-type="string">
            <text:p>01h01</text:p>
            <text:p>07h55</text:p>
            <text:p>13h32</text:p>
            <text:p>20h12</text:p>
          </table:table-cell>
          <table:table-cell table:style-name="ce2" office:value-type="string" calcext:value-type="string">
            <text:p>5,31m</text:p>
            <text:p>2,34m</text:p>
            <text:p>4,98m</text:p>
            <text:p>2,79m</text:p>
          </table:table-cell>
          <table:table-cell table:style-name="ce2" office:value-type="string" calcext:value-type="string">
            <text:p>48</text:p>
            <text:p> </text:p>
            <text:p>44</text:p>
            <text:p> 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Sam.09</text:a></text:p>
          </table:table-cell>
          <table:table-cell table:style-name="ce2" office:value-type="string" calcext:value-type="string">
            <text:p>01h48</text:p>
            <text:p>08h46</text:p>
            <text:p>14h31</text:p>
            <text:p>21h16</text:p>
          </table:table-cell>
          <table:table-cell table:style-name="ce2" office:value-type="string" calcext:value-type="string">
            <text:p>5,04m</text:p>
            <text:p>2,56m</text:p>
            <text:p>4,76m</text:p>
            <text:p>2,98m</text:p>
          </table:table-cell>
          <table:table-cell table:style-name="ce2" office:value-type="string" calcext:value-type="string">
            <text:p>40</text:p>
            <text:p> </text:p>
            <text:p>37</text:p>
            <text:p> 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Dim.10</text:a></text:p>
          </table:table-cell>
          <table:table-cell table:style-name="ce2" office:value-type="string" calcext:value-type="string">
            <text:p>02h55</text:p>
            <text:p>09h55</text:p>
            <text:p>15h54</text:p>
            <text:p>22h39</text:p>
          </table:table-cell>
          <table:table-cell table:style-name="ce2" office:value-type="string" calcext:value-type="string">
            <text:p>4,83m</text:p>
            <text:p>2,68m</text:p>
            <text:p>4,70m</text:p>
            <text:p>2,99m</text:p>
          </table:table-cell>
          <table:table-cell table:style-name="ce2" office:value-type="string" calcext:value-type="string">
            <text:p>35</text:p>
            <text:p> </text:p>
            <text:p>35</text:p>
            <text:p> 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Lun.11</text:a></text:p>
          </table:table-cell>
          <table:table-cell table:style-name="ce2" office:value-type="string" calcext:value-type="string">
            <text:p>04h20</text:p>
            <text:p>11h15</text:p>
            <text:p>17h18</text:p>
            <text:p>23h59</text:p>
          </table:table-cell>
          <table:table-cell table:style-name="ce2" office:value-type="string" calcext:value-type="string">
            <text:p>4,81m</text:p>
            <text:p>2,60m</text:p>
            <text:p>4,86m</text:p>
            <text:p>2,76m</text:p>
          </table:table-cell>
          <table:table-cell table:style-name="ce2" office:value-type="string" calcext:value-type="string">
            <text:p>36</text:p>
            <text:p> </text:p>
            <text:p>40</text:p>
            <text:p> </text:p>
          </table:table-cell>
          <table:table-cell office:value-type="string" calcext:value-type="string">
            <text:p>mai</text:p>
          </table:table-cell>
        </table:table-row>
        <table:table-row table:style-name="ro3">
          <table:table-cell office:value-type="string" calcext:value-type="string">
            <text:p><text:a xlink:href="https://maree.info/33" xlink:type="simple">Mar.12</text:a></text:p>
          </table:table-cell>
          <table:table-cell table:style-name="ce2" office:value-type="string" calcext:value-type="string">
            <text:p>05h37</text:p>
            <text:p>12h26</text:p>
            <text:p>18h22</text:p>
          </table:table-cell>
          <table:table-cell table:style-name="ce2" office:value-type="string" calcext:value-type="string">
            <text:p>5,02m</text:p>
            <text:p>2,33m</text:p>
            <text:p>5,19m</text:p>
          </table:table-cell>
          <table:table-cell table:style-name="ce2" office:value-type="string" calcext:value-type="string">
            <text:p>45</text:p>
            <text:p> </text:p>
            <text:p>51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Mer.13</text:a></text:p>
          </table:table-cell>
          <table:table-cell office:value-type="string" calcext:value-type="string">
            <text:p>01h01</text:p>
            <text:p>06h37</text:p>
            <text:p>13h24</text:p>
            <text:p>19h12</text:p>
          </table:table-cell>
          <table:table-cell office:value-type="string" calcext:value-type="string">
            <text:p>2,39m</text:p>
            <text:p>5,36m</text:p>
            <text:p>1,97m</text:p>
            <text:p>5,56m</text:p>
          </table:table-cell>
          <table:table-cell office:value-type="string" calcext:value-type="string">
            <text:p> </text:p>
            <text:p>57</text:p>
            <text:p> </text:p>
            <text:p>64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Jeu.14</text:a></text:p>
          </table:table-cell>
          <table:table-cell office:value-type="string" calcext:value-type="string">
            <text:p>01h54</text:p>
            <text:p>07h29</text:p>
            <text:p>14h16</text:p>
            <text:p>19h59</text:p>
          </table:table-cell>
          <table:table-cell office:value-type="string" calcext:value-type="string">
            <text:p>1,99m</text:p>
            <text:p>5,73m</text:p>
            <text:p>1,62m</text:p>
            <text:p>5,92m</text:p>
          </table:table-cell>
          <table:table-cell office:value-type="string" calcext:value-type="string">
            <text:p> </text:p>
            <text:p>70</text:p>
            <text:p> </text:p>
            <text:p>77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?d=202605150" xlink:type="simple">Ven.15</text:a></text:p>
          </table:table-cell>
          <table:table-cell office:value-type="string" calcext:value-type="string">
            <text:p>02h43</text:p>
            <text:p>08h18</text:p>
            <text:p>15h04</text:p>
            <text:p>20h44</text:p>
          </table:table-cell>
          <table:table-cell office:value-type="string" calcext:value-type="string">
            <text:p>1,61m</text:p>
            <text:p>6,05m</text:p>
            <text:p>1,33m</text:p>
            <text:p>6,22m</text:p>
          </table:table-cell>
          <table:table-cell office:value-type="string" calcext:value-type="string">
            <text:p> </text:p>
            <text:p>83</text:p>
            <text:p> </text:p>
            <text:p>88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Sam.16</text:a></text:p>
          </table:table-cell>
          <table:table-cell office:value-type="string" calcext:value-type="string">
            <text:p>03h32</text:p>
            <text:p>09h07</text:p>
            <text:p>15h52</text:p>
            <text:p>21h29</text:p>
          </table:table-cell>
          <table:table-cell office:value-type="string" calcext:value-type="string">
            <text:p>1,30m</text:p>
            <text:p>6,29m</text:p>
            <text:p>1,14m</text:p>
            <text:p>6,42m</text:p>
          </table:table-cell>
          <table:table-cell office:value-type="string" calcext:value-type="string">
            <text:p> </text:p>
            <text:p>92</text:p>
            <text:p> </text:p>
            <text:p>96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Dim.17</text:a></text:p>
          </table:table-cell>
          <table:table-cell office:value-type="string" calcext:value-type="string">
            <text:p>04h19</text:p>
            <text:p>09h55</text:p>
            <text:p>16h39</text:p>
            <text:p>22h14</text:p>
          </table:table-cell>
          <table:table-cell office:value-type="string" calcext:value-type="string">
            <text:p>1,07m</text:p>
            <text:p>6,43m</text:p>
            <text:p>1,07m</text:p>
            <text:p>6,53m</text:p>
          </table:table-cell>
          <table:table-cell office:value-type="string" calcext:value-type="string">
            <text:p> </text:p>
            <text:p>98</text:p>
            <text:p> </text:p>
            <text:p>99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Lun.18</text:a></text:p>
          </table:table-cell>
          <table:table-cell office:value-type="string" calcext:value-type="string">
            <text:p>05h07</text:p>
            <text:p>10h44</text:p>
            <text:p>17h26</text:p>
            <text:p>22h59</text:p>
          </table:table-cell>
          <table:table-cell office:value-type="string" calcext:value-type="string">
            <text:p>0,96m</text:p>
            <text:p>6,44m</text:p>
            <text:p>1,13m</text:p>
            <text:p>6,53m</text:p>
          </table:table-cell>
          <table:table-cell office:value-type="string" calcext:value-type="string">
            <text:p> </text:p>
            <text:p>99</text:p>
            <text:p> </text:p>
            <text:p>97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Mar.19</text:a></text:p>
          </table:table-cell>
          <table:table-cell office:value-type="string" calcext:value-type="string">
            <text:p>05h55</text:p>
            <text:p>11h32</text:p>
            <text:p>18h13</text:p>
            <text:p>23h45</text:p>
          </table:table-cell>
          <table:table-cell office:value-type="string" calcext:value-type="string">
            <text:p>0,97m</text:p>
            <text:p>6,32m</text:p>
            <text:p>1,32m</text:p>
            <text:p>6,40m</text:p>
          </table:table-cell>
          <table:table-cell office:value-type="string" calcext:value-type="string">
            <text:p> </text:p>
            <text:p>95</text:p>
            <text:p> </text:p>
            <text:p>91</text:p>
          </table:table-cell>
          <table:table-cell office:value-type="string" calcext:value-type="string">
            <text:p>mai</text:p>
          </table:table-cell>
        </table:table-row>
        <table:table-row table:style-name="ro3">
          <table:table-cell office:value-type="string" calcext:value-type="string">
            <text:p><text:a xlink:href="https://maree.info/33" xlink:type="simple">Mer.20</text:a></text:p>
          </table:table-cell>
          <table:table-cell office:value-type="string" calcext:value-type="string">
            <text:p>06h44</text:p>
            <text:p>12h22</text:p>
            <text:p>19h02</text:p>
          </table:table-cell>
          <table:table-cell office:value-type="string" calcext:value-type="string">
            <text:p>1,12m</text:p>
            <text:p>6,09m</text:p>
            <text:p>1,60m</text:p>
          </table:table-cell>
          <table:table-cell office:value-type="string" calcext:value-type="string">
            <text:p> </text:p>
            <text:p>87</text:p>
            <text:p> 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Jeu.21</text:a></text:p>
          </table:table-cell>
          <table:table-cell table:style-name="ce2" office:value-type="string" calcext:value-type="string">
            <text:p>00h33</text:p>
            <text:p>07h35</text:p>
            <text:p>13h14</text:p>
            <text:p>19h55</text:p>
          </table:table-cell>
          <table:table-cell table:style-name="ce2" office:value-type="string" calcext:value-type="string">
            <text:p>6,17m</text:p>
            <text:p>1,37m</text:p>
            <text:p>5,78m</text:p>
            <text:p>1,93m</text:p>
          </table:table-cell>
          <table:table-cell table:style-name="ce2" office:value-type="string" calcext:value-type="string">
            <text:p>81</text:p>
            <text:p> </text:p>
            <text:p>76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Ven.22</text:a></text:p>
          </table:table-cell>
          <table:table-cell table:style-name="ce2" office:value-type="string" calcext:value-type="string">
            <text:p>01h25</text:p>
            <text:p>08h30</text:p>
            <text:p>14h12</text:p>
            <text:p>20h53</text:p>
          </table:table-cell>
          <table:table-cell table:style-name="ce2" office:value-type="string" calcext:value-type="string">
            <text:p>5,85m</text:p>
            <text:p>1,69m</text:p>
            <text:p>5,46m</text:p>
            <text:p>2,25m</text:p>
          </table:table-cell>
          <table:table-cell table:style-name="ce2" office:value-type="string" calcext:value-type="string">
            <text:p>70</text:p>
            <text:p> </text:p>
            <text:p>64</text:p>
            <text:p> 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Sam.23</text:a></text:p>
          </table:table-cell>
          <table:table-cell table:style-name="ce2" office:value-type="string" calcext:value-type="string">
            <text:p>02h24</text:p>
            <text:p>09h31</text:p>
            <text:p>15h19</text:p>
            <text:p>22h00</text:p>
          </table:table-cell>
          <table:table-cell table:style-name="ce2" office:value-type="string" calcext:value-type="string">
            <text:p>5,53m</text:p>
            <text:p>1,98m</text:p>
            <text:p>5,21m</text:p>
            <text:p>2,47m</text:p>
          </table:table-cell>
          <table:table-cell table:style-name="ce2" office:value-type="string" calcext:value-type="string">
            <text:p>59</text:p>
            <text:p> </text:p>
            <text:p>55</text:p>
            <text:p> 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Dim.24</text:a></text:p>
          </table:table-cell>
          <table:table-cell table:style-name="ce2" office:value-type="string" calcext:value-type="string">
            <text:p>03h33</text:p>
            <text:p>10h40</text:p>
            <text:p>16h30</text:p>
            <text:p>23h13</text:p>
          </table:table-cell>
          <table:table-cell table:style-name="ce2" office:value-type="string" calcext:value-type="string">
            <text:p>5,29m</text:p>
            <text:p>2,16m</text:p>
            <text:p>5,11m</text:p>
            <text:p>2,53m</text:p>
          </table:table-cell>
          <table:table-cell table:style-name="ce2" office:value-type="string" calcext:value-type="string">
            <text:p>52</text:p>
            <text:p> </text:p>
            <text:p>51</text:p>
            <text:p> </text:p>
          </table:table-cell>
          <table:table-cell office:value-type="string" calcext:value-type="string">
            <text:p>mai</text:p>
          </table:table-cell>
        </table:table-row>
        <table:table-row table:style-name="ro3">
          <table:table-cell office:value-type="string" calcext:value-type="string">
            <text:p><text:a xlink:href="https://maree.info/33" xlink:type="simple">Lun.25</text:a></text:p>
          </table:table-cell>
          <table:table-cell table:style-name="ce2" office:value-type="string" calcext:value-type="string">
            <text:p>04h44</text:p>
            <text:p>11h49</text:p>
            <text:p>17h37</text:p>
          </table:table-cell>
          <table:table-cell table:style-name="ce2" office:value-type="string" calcext:value-type="string">
            <text:p>5,19m</text:p>
            <text:p>2,21m</text:p>
            <text:p>5,16m</text:p>
          </table:table-cell>
          <table:table-cell table:style-name="ce2" office:value-type="string" calcext:value-type="string">
            <text:p>50</text:p>
            <text:p> </text:p>
            <text:p>51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Mar.26</text:a></text:p>
          </table:table-cell>
          <table:table-cell office:value-type="string" calcext:value-type="string">
            <text:p>00h20</text:p>
            <text:p>05h51</text:p>
            <text:p>12h50</text:p>
            <text:p>18h36</text:p>
          </table:table-cell>
          <table:table-cell office:value-type="string" calcext:value-type="string">
            <text:p>2,44m</text:p>
            <text:p>5,23m</text:p>
            <text:p>2,15m</text:p>
            <text:p>5,32m</text:p>
          </table:table-cell>
          <table:table-cell office:value-type="string" calcext:value-type="string">
            <text:p> </text:p>
            <text:p>53</text:p>
            <text:p> </text:p>
            <text:p>55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Mer.27</text:a></text:p>
          </table:table-cell>
          <table:table-cell office:value-type="string" calcext:value-type="string">
            <text:p>01h19</text:p>
            <text:p>06h50</text:p>
            <text:p>13h44</text:p>
            <text:p>19h25</text:p>
          </table:table-cell>
          <table:table-cell office:value-type="string" calcext:value-type="string">
            <text:p>2,28m</text:p>
            <text:p>5,35m</text:p>
            <text:p>2,05m</text:p>
            <text:p>5,51m</text:p>
          </table:table-cell>
          <table:table-cell office:value-type="string" calcext:value-type="string">
            <text:p> </text:p>
            <text:p>57</text:p>
            <text:p> </text:p>
            <text:p>60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Jeu.28</text:a></text:p>
          </table:table-cell>
          <table:table-cell office:value-type="string" calcext:value-type="string">
            <text:p>02h10</text:p>
            <text:p>07h42</text:p>
            <text:p>14h30</text:p>
            <text:p>20h09</text:p>
          </table:table-cell>
          <table:table-cell office:value-type="string" calcext:value-type="string">
            <text:p>2,10m</text:p>
            <text:p>5,49m</text:p>
            <text:p>1,95m</text:p>
            <text:p>5,68m</text:p>
          </table:table-cell>
          <table:table-cell office:value-type="string" calcext:value-type="string">
            <text:p> </text:p>
            <text:p>62</text:p>
            <text:p> </text:p>
            <text:p>65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?d=202605290" xlink:type="simple">Ven.29</text:a></text:p>
          </table:table-cell>
          <table:table-cell office:value-type="string" calcext:value-type="string">
            <text:p>02h54</text:p>
            <text:p>08h27</text:p>
            <text:p>15h12</text:p>
            <text:p>20h49</text:p>
          </table:table-cell>
          <table:table-cell office:value-type="string" calcext:value-type="string">
            <text:p>1,95m</text:p>
            <text:p>5,61m</text:p>
            <text:p>1,88m</text:p>
            <text:p>5,81m</text:p>
          </table:table-cell>
          <table:table-cell office:value-type="string" calcext:value-type="string">
            <text:p> </text:p>
            <text:p>67</text:p>
            <text:p> </text:p>
            <text:p>68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Sam.30</text:a></text:p>
          </table:table-cell>
          <table:table-cell office:value-type="string" calcext:value-type="string">
            <text:p>03h34</text:p>
            <text:p>09h08</text:p>
            <text:p>15h50</text:p>
            <text:p>21h25</text:p>
          </table:table-cell>
          <table:table-cell office:value-type="string" calcext:value-type="string">
            <text:p>1,83m</text:p>
            <text:p>5,69m</text:p>
            <text:p>1,84m</text:p>
            <text:p>5,89m</text:p>
          </table:table-cell>
          <table:table-cell office:value-type="string" calcext:value-type="string">
            <text:p> </text:p>
            <text:p>70</text:p>
            <text:p> </text:p>
            <text:p>70</text:p>
          </table:table-cell>
          <table:table-cell office:value-type="string" calcext:value-type="string">
            <text:p>mai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Dim.31</text:a></text:p>
          </table:table-cell>
          <table:table-cell office:value-type="string" calcext:value-type="string">
            <text:p>04h11</text:p>
            <text:p>09h46</text:p>
            <text:p>16h25</text:p>
            <text:p>21h59</text:p>
          </table:table-cell>
          <table:table-cell office:value-type="string" calcext:value-type="string">
            <text:p>1,74m</text:p>
            <text:p>5,73m</text:p>
            <text:p>1,84m</text:p>
            <text:p>5,93m</text:p>
          </table:table-cell>
          <table:table-cell office:value-type="string" calcext:value-type="string">
            <text:p> </text:p>
            <text:p>71</text:p>
            <text:p> </text:p>
            <text:p>71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<text:a xlink:href="https://maree.info/33" xlink:type="simple">Lun.01</text:a></text:p>
          </table:table-cell>
          <table:table-cell office:value-type="string" calcext:value-type="string">
            <text:p>04h46</text:p>
            <text:p>10h21</text:p>
            <text:p>16h59</text:p>
            <text:p>22h32</text:p>
          </table:table-cell>
          <table:table-cell office:value-type="string" calcext:value-type="string">
            <text:p>1,68m</text:p>
            <text:p>5,74m</text:p>
            <text:p>1,87m</text:p>
            <text:p>5,94m</text:p>
          </table:table-cell>
          <table:table-cell office:value-type="string" calcext:value-type="string">
            <text:p> </text:p>
            <text:p>71</text:p>
            <text:p> </text:p>
            <text:p>71</text:p>
          </table:table-cell>
          <table:table-cell office:value-type="string" calcext:value-type="string">
            <text:p>juin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Mar.02</text:a></text:p>
          </table:table-cell>
          <table:table-cell office:value-type="string" calcext:value-type="string">
            <text:p>05h20</text:p>
            <text:p>10h54</text:p>
            <text:p>17h32</text:p>
            <text:p>23h04</text:p>
          </table:table-cell>
          <table:table-cell office:value-type="string" calcext:value-type="string">
            <text:p>1,67m</text:p>
            <text:p>5,71m</text:p>
            <text:p>1,94m</text:p>
            <text:p>5,91m</text:p>
          </table:table-cell>
          <table:table-cell office:value-type="string" calcext:value-type="string">
            <text:p> </text:p>
            <text:p>70</text:p>
            <text:p> </text:p>
            <text:p>69</text:p>
          </table:table-cell>
          <table:table-cell office:value-type="string" calcext:value-type="string">
            <text:p>juin</text:p>
          </table:table-cell>
        </table:table-row>
        <table:table-row table:style-name="ro2">
          <table:table-cell office:value-type="string" calcext:value-type="string">
            <text:p><text:a xlink:href="https://maree.info/33" xlink:type="simple">Mer.03</text:a></text:p>
          </table:table-cell>
          <table:table-cell office:value-type="string" calcext:value-type="string">
            <text:p>05h54</text:p>
            <text:p>11h27</text:p>
            <text:p>18h06</text:p>
            <text:p>23h37</text:p>
          </table:table-cell>
          <table:table-cell office:value-type="string" calcext:value-type="string">
            <text:p>1,71m</text:p>
            <text:p>5,65m</text:p>
            <text:p>2,05m</text:p>
            <text:p>5,83m</text:p>
          </table:table-cell>
          <table:table-cell office:value-type="string" calcext:value-type="string">
            <text:p> </text:p>
            <text:p>68</text:p>
            <text:p> </text:p>
            <text:p>66</text:p>
          </table:table-cell>
          <table:table-cell office:value-type="string" calcext:value-type="string">
            <text:p>juin</text:p>
          </table:table-cell>
        </table:table-row>
        <table:table-row table:style-name="ro3">
          <table:table-cell office:value-type="string" calcext:value-type="string">
            <text:p><text:a xlink:href="https://maree.info/33" xlink:type="simple">Jeu.04</text:a></text:p>
          </table:table-cell>
          <table:table-cell office:value-type="string" calcext:value-type="string">
            <text:p>06h28</text:p>
            <text:p>12h02</text:p>
            <text:p>18h40</text:p>
          </table:table-cell>
          <table:table-cell office:value-type="string" calcext:value-type="string">
            <text:p>1,79m</text:p>
            <text:p>5,56m</text:p>
            <text:p>2,18m</text:p>
          </table:table-cell>
          <table:table-cell office:value-type="string" calcext:value-type="string">
            <text:p> </text:p>
            <text:p>64</text:p>
            <text:p> </text:p>
          </table:table-cell>
          <table:table-cell office:value-type="string" calcext:value-type="string">
            <text:p>juin</text:p>
          </table:table-cell>
        </table:table-row>
        <table:table-row table:style-name="ro1">
          <table:table-cell office:value-type="string" calcext:value-type="string">
            <text:p><text:a xlink:href="https://maree.info/33?d=202606050" xlink:type="simple">Ven.05</text:a></text:p>
          </table:table-cell>
          <table:table-cell table:style-name="ce2" office:value-type="string" calcext:value-type="string">
            <text:p>00h13</text:p>
            <text:p>07h04</text:p>
            <text:p>12h40</text:p>
            <text:p>19h18</text:p>
          </table:table-cell>
          <table:table-cell table:style-name="ce2" office:value-type="string" calcext:value-type="string">
            <text:p>5,71m</text:p>
            <text:p>1,91m</text:p>
            <text:p>5,43m</text:p>
            <text:p>2,33m</text:p>
          </table:table-cell>
          <table:table-cell table:style-name="ce2" office:value-type="string" calcext:value-type="string">
            <text:p>62</text:p>
            <text:p> </text:p>
            <text:p>59</text:p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Sam.06</text:a></text:p>
          </table:table-cell>
          <table:table-cell table:style-name="ce2" office:value-type="string" calcext:value-type="string">
            <text:p>00h53</text:p>
            <text:p>07h43</text:p>
            <text:p>13h22</text:p>
            <text:p>20h01</text:p>
          </table:table-cell>
          <table:table-cell table:style-name="ce2" office:value-type="string" calcext:value-type="string">
            <text:p>5,55m</text:p>
            <text:p>2,05m</text:p>
            <text:p>5,28m</text:p>
            <text:p>2,47m</text:p>
          </table:table-cell>
          <table:table-cell table:style-name="ce2" office:value-type="string" calcext:value-type="string">
            <text:p>57</text:p>
            <text:p> </text:p>
            <text:p>54</text:p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Dim.07</text:a></text:p>
          </table:table-cell>
          <table:table-cell table:style-name="ce2" office:value-type="string" calcext:value-type="string">
            <text:p>01h37</text:p>
            <text:p>08h29</text:p>
            <text:p>14h10</text:p>
            <text:p>20h53</text:p>
          </table:table-cell>
          <table:table-cell table:style-name="ce2" office:value-type="string" calcext:value-type="string">
            <text:p>5,38m</text:p>
            <text:p>2,18m</text:p>
            <text:p>5,14m</text:p>
            <text:p>2,59m</text:p>
          </table:table-cell>
          <table:table-cell table:style-name="ce2" office:value-type="string" calcext:value-type="string">
            <text:p>52</text:p>
            <text:p> </text:p>
            <text:p>50</text:p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Lun.08</text:a></text:p>
          </table:table-cell>
          <table:table-cell table:style-name="ce2" office:value-type="string" calcext:value-type="string">
            <text:p>02h28</text:p>
            <text:p>09h21</text:p>
            <text:p>15h06</text:p>
            <text:p>21h53</text:p>
          </table:table-cell>
          <table:table-cell table:style-name="ce2" office:value-type="string" calcext:value-type="string">
            <text:p>5,23m</text:p>
            <text:p>2,29m</text:p>
            <text:p>5,06m</text:p>
            <text:p>2,64m</text:p>
          </table:table-cell>
          <table:table-cell table:style-name="ce2" office:value-type="string" calcext:value-type="string">
            <text:p>48</text:p>
            <text:p> </text:p>
            <text:p>47</text:p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Mar.09</text:a></text:p>
          </table:table-cell>
          <table:table-cell table:style-name="ce2" office:value-type="string" calcext:value-type="string">
            <text:p>03h27</text:p>
            <text:p>10h22</text:p>
            <text:p>16h10</text:p>
            <text:p>23h00</text:p>
          </table:table-cell>
          <table:table-cell table:style-name="ce2" office:value-type="string" calcext:value-type="string">
            <text:p>5,15m</text:p>
            <text:p>2,32m</text:p>
            <text:p>5,08m</text:p>
            <text:p>2,59m</text:p>
          </table:table-cell>
          <table:table-cell table:style-name="ce2" office:value-type="string" calcext:value-type="string">
            <text:p>47</text:p>
            <text:p> </text:p>
            <text:p>47</text:p>
            <text:p> </text:p>
          </table:table-cell>
          <table:table-cell/>
        </table:table-row>
        <table:table-row table:style-name="ro4">
          <table:table-cell office:value-type="string" calcext:value-type="string">
            <text:p><text:a xlink:href="https://maree.info/33" xlink:type="simple">Mer.10</text:a></text:p>
          </table:table-cell>
          <table:table-cell table:style-name="ce2" office:value-type="string" calcext:value-type="string">
            <text:p>04h32</text:p>
            <text:p>11h28</text:p>
            <text:p>17h17</text:p>
          </table:table-cell>
          <table:table-cell table:style-name="ce2" office:value-type="string" calcext:value-type="string">
            <text:p>5,18m</text:p>
            <text:p>2,25m</text:p>
            <text:p>5,22m</text:p>
          </table:table-cell>
          <table:table-cell table:style-name="ce2" office:value-type="string" calcext:value-type="string">
            <text:p>49</text:p>
            <text:p> </text:p>
            <text:p>52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Jeu.11</text:a></text:p>
          </table:table-cell>
          <table:table-cell office:value-type="string" calcext:value-type="string">
            <text:p>00h07</text:p>
            <text:p>05h40</text:p>
            <text:p>12h34</text:p>
            <text:p>18h21</text:p>
          </table:table-cell>
          <table:table-cell office:value-type="string" calcext:value-type="string">
            <text:p>2,41m</text:p>
            <text:p>5,33m</text:p>
            <text:p>2,09m</text:p>
            <text:p>5,47m</text:p>
          </table:table-cell>
          <table:table-cell office:value-type="string" calcext:value-type="string">
            <text:p> </text:p>
            <text:p>55</text:p>
            <text:p> </text:p>
            <text:p>60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Ven.12</text:a></text:p>
          </table:table-cell>
          <table:table-cell office:value-type="string" calcext:value-type="string">
            <text:p>01h10</text:p>
            <text:p>06h45</text:p>
            <text:p>13h36</text:p>
            <text:p>19h19</text:p>
          </table:table-cell>
          <table:table-cell office:value-type="string" calcext:value-type="string">
            <text:p>2,13m</text:p>
            <text:p>5,55m</text:p>
            <text:p>1,86m</text:p>
            <text:p>5,75m</text:p>
          </table:table-cell>
          <table:table-cell office:value-type="string" calcext:value-type="string">
            <text:p> </text:p>
            <text:p>64</text:p>
            <text:p> </text:p>
            <text:p>69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Sam.13</text:a></text:p>
          </table:table-cell>
          <table:table-cell office:value-type="string" calcext:value-type="string">
            <text:p>02h09</text:p>
            <text:p>07h47</text:p>
            <text:p>14h34</text:p>
            <text:p>20h14</text:p>
          </table:table-cell>
          <table:table-cell office:value-type="string" calcext:value-type="string">
            <text:p>1,80m</text:p>
            <text:p>5,81m</text:p>
            <text:p>1,64m</text:p>
            <text:p>6,03m</text:p>
          </table:table-cell>
          <table:table-cell office:value-type="string" calcext:value-type="string">
            <text:p> </text:p>
            <text:p>74</text:p>
            <text:p> </text:p>
            <text:p>79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Dim.14</text:a></text:p>
          </table:table-cell>
          <table:table-cell office:value-type="string" calcext:value-type="string">
            <text:p>03h06</text:p>
            <text:p>08h45</text:p>
            <text:p>15h29</text:p>
            <text:p>21h07</text:p>
          </table:table-cell>
          <table:table-cell office:value-type="string" calcext:value-type="string">
            <text:p>1,49m</text:p>
            <text:p>6,04m</text:p>
            <text:p>1,45m</text:p>
            <text:p>6,26m</text:p>
          </table:table-cell>
          <table:table-cell office:value-type="string" calcext:value-type="string">
            <text:p> </text:p>
            <text:p>83</text:p>
            <text:p> </text:p>
            <text:p>87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Lun.15</text:a></text:p>
          </table:table-cell>
          <table:table-cell office:value-type="string" calcext:value-type="string">
            <text:p>04h01</text:p>
            <text:p>09h41</text:p>
            <text:p>16h23</text:p>
            <text:p>21h58</text:p>
          </table:table-cell>
          <table:table-cell office:value-type="string" calcext:value-type="string">
            <text:p>1,23m</text:p>
            <text:p>6,20m</text:p>
            <text:p>1,34m</text:p>
            <text:p>6,42m</text:p>
          </table:table-cell>
          <table:table-cell office:value-type="string" calcext:value-type="string">
            <text:p> </text:p>
            <text:p>90</text:p>
            <text:p> </text:p>
            <text:p>93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Mar.16</text:a></text:p>
          </table:table-cell>
          <table:table-cell office:value-type="string" calcext:value-type="string">
            <text:p>04h56</text:p>
            <text:p>10h35</text:p>
            <text:p>17h16</text:p>
            <text:p>22h49</text:p>
          </table:table-cell>
          <table:table-cell office:value-type="string" calcext:value-type="string">
            <text:p>1,05m</text:p>
            <text:p>6,28m</text:p>
            <text:p>1,31m</text:p>
            <text:p>6,49m</text:p>
          </table:table-cell>
          <table:table-cell office:value-type="string" calcext:value-type="string">
            <text:p> </text:p>
            <text:p>94</text:p>
            <text:p> </text:p>
            <text:p>95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Mer.17</text:a></text:p>
          </table:table-cell>
          <table:table-cell office:value-type="string" calcext:value-type="string">
            <text:p>05h48</text:p>
            <text:p>11h28</text:p>
            <text:p>18h07</text:p>
            <text:p>23h40</text:p>
          </table:table-cell>
          <table:table-cell office:value-type="string" calcext:value-type="string">
            <text:p>0,97m</text:p>
            <text:p>6,27m</text:p>
            <text:p>1,36m</text:p>
            <text:p>6,45m</text:p>
          </table:table-cell>
          <table:table-cell office:value-type="string" calcext:value-type="string">
            <text:p> </text:p>
            <text:p>94</text:p>
            <text:p> </text:p>
            <text:p>93</text:p>
          </table:table-cell>
          <table:table-cell/>
        </table:table-row>
        <table:table-row table:style-name="ro4">
          <table:table-cell office:value-type="string" calcext:value-type="string">
            <text:p><text:a xlink:href="https://maree.info/33" xlink:type="simple">Jeu.18</text:a></text:p>
          </table:table-cell>
          <table:table-cell office:value-type="string" calcext:value-type="string">
            <text:p>06h39</text:p>
            <text:p>12h19</text:p>
            <text:p>18h57</text:p>
          </table:table-cell>
          <table:table-cell office:value-type="string" calcext:value-type="string">
            <text:p>1,01m</text:p>
            <text:p>6,16m</text:p>
            <text:p>1,49m</text:p>
          </table:table-cell>
          <table:table-cell office:value-type="string" calcext:value-type="string">
            <text:p> </text:p>
            <text:p>90</text:p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?d=202606190" xlink:type="simple">Ven.19</text:a></text:p>
          </table:table-cell>
          <table:table-cell table:style-name="ce2" office:value-type="string" calcext:value-type="string">
            <text:p>00h29</text:p>
            <text:p>07h29</text:p>
            <text:p>13h09</text:p>
            <text:p>19h47</text:p>
          </table:table-cell>
          <table:table-cell table:style-name="ce2" office:value-type="string" calcext:value-type="string">
            <text:p>6,32m</text:p>
            <text:p>1,16m</text:p>
            <text:p>5,97m</text:p>
            <text:p>1,69m</text:p>
          </table:table-cell>
          <table:table-cell table:style-name="ce2" office:value-type="string" calcext:value-type="string">
            <text:p>87</text:p>
            <text:p> </text:p>
            <text:p>83</text:p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Sam.20</text:a></text:p>
          </table:table-cell>
          <table:table-cell table:style-name="ce2" office:value-type="string" calcext:value-type="string">
            <text:p>01h18</text:p>
            <text:p>08h17</text:p>
            <text:p>13h57</text:p>
            <text:p>20h36</text:p>
          </table:table-cell>
          <table:table-cell table:style-name="ce2" office:value-type="string" calcext:value-type="string">
            <text:p>6,10m</text:p>
            <text:p>1,42m</text:p>
            <text:p>5,73m</text:p>
            <text:p>1,94m</text:p>
          </table:table-cell>
          <table:table-cell table:style-name="ce2" office:value-type="string" calcext:value-type="string">
            <text:p>79</text:p>
            <text:p> </text:p>
            <text:p>74</text:p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Dim.21</text:a></text:p>
          </table:table-cell>
          <table:table-cell table:style-name="ce2" office:value-type="string" calcext:value-type="string">
            <text:p>02h07</text:p>
            <text:p>09h06</text:p>
            <text:p>14h46</text:p>
            <text:p>21h27</text:p>
          </table:table-cell>
          <table:table-cell table:style-name="ce2" office:value-type="string" calcext:value-type="string">
            <text:p>5,81m</text:p>
            <text:p>1,73m</text:p>
            <text:p>5,48m</text:p>
            <text:p>2,20m</text:p>
          </table:table-cell>
          <table:table-cell table:style-name="ce2" office:value-type="string" calcext:value-type="string">
            <text:p>69</text:p>
            <text:p> </text:p>
            <text:p>64</text:p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Lun.22</text:a></text:p>
          </table:table-cell>
          <table:table-cell table:style-name="ce2" office:value-type="string" calcext:value-type="string">
            <text:p>02h57</text:p>
            <text:p>09h56</text:p>
            <text:p>15h37</text:p>
            <text:p>22h22</text:p>
          </table:table-cell>
          <table:table-cell table:style-name="ce2" office:value-type="string" calcext:value-type="string">
            <text:p>5,52m</text:p>
            <text:p>2,04m</text:p>
            <text:p>5,27m</text:p>
            <text:p>2,42m</text:p>
          </table:table-cell>
          <table:table-cell table:style-name="ce2" office:value-type="string" calcext:value-type="string">
            <text:p>59</text:p>
            <text:p> </text:p>
            <text:p>55</text:p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Mar.23</text:a></text:p>
          </table:table-cell>
          <table:table-cell table:style-name="ce2" office:value-type="string" calcext:value-type="string">
            <text:p>03h51</text:p>
            <text:p>10h51</text:p>
            <text:p>16h34</text:p>
            <text:p>23h23</text:p>
          </table:table-cell>
          <table:table-cell table:style-name="ce2" office:value-type="string" calcext:value-type="string">
            <text:p>5,26m</text:p>
            <text:p>2,29m</text:p>
            <text:p>5,14m</text:p>
            <text:p>2,54m</text:p>
          </table:table-cell>
          <table:table-cell table:style-name="ce2" office:value-type="string" calcext:value-type="string">
            <text:p>51</text:p>
            <text:p> </text:p>
            <text:p>48</text:p>
            <text:p> </text:p>
          </table:table-cell>
          <table:table-cell/>
        </table:table-row>
        <table:table-row table:style-name="ro4">
          <table:table-cell office:value-type="string" calcext:value-type="string">
            <text:p><text:a xlink:href="https://maree.info/33" xlink:type="simple">Mer.24</text:a></text:p>
          </table:table-cell>
          <table:table-cell table:style-name="ce2" office:value-type="string" calcext:value-type="string">
            <text:p>04h52</text:p>
            <text:p>11h52</text:p>
            <text:p>17h37</text:p>
          </table:table-cell>
          <table:table-cell table:style-name="ce2" office:value-type="string" calcext:value-type="string">
            <text:p>5,08m</text:p>
            <text:p>2,44m</text:p>
            <text:p>5,12m</text:p>
          </table:table-cell>
          <table:table-cell table:style-name="ce2" office:value-type="string" calcext:value-type="string">
            <text:p>47</text:p>
            <text:p> </text:p>
            <text:p>46</text:p>
          </table:table-cell>
          <table:table-cell/>
        </table:table-row>
        <table:table-row table:style-name="ro1">
          <table:table-cell office:value-type="string" calcext:value-type="string">
            <text:p><text:a xlink:href="https://maree.info/33" xlink:type="simple">Jeu.25</text:a></text:p>
          </table:table-cell>
          <table:table-cell office:value-type="string" calcext:value-type="string">
            <text:p>00h27</text:p>
            <text:p>06h00</text:p>
            <text:p>12h54</text:p>
            <text:p>18h40</text:p>
          </table:table-cell>
          <table:table-cell office:value-type="string" calcext:value-type="string">
            <text:p>2,55m</text:p>
            <text:p>5,02m</text:p>
            <text:p>2,47m</text:p>
            <text:p>5,20m</text:p>
          </table:table-cell>
          <table:table-cell office:value-type="string" calcext:value-type="string">
            <text:p> </text:p>
            <text:p>46</text:p>
            <text:p> </text:p>
            <text:p>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égis GALLON GARCIA</meta:initial-creator>
    <meta:creation-date>2026-05-08T12:05:00.898099932</meta:creation-date>
    <dc:date>2026-05-08T12:08:39.292852742</dc:date>
    <dc:creator>Régis GALLON GARCIA</dc:creator>
    <meta:editing-duration>PT3M38S</meta:editing-duration>
    <meta:editing-cycles>2</meta:editing-cycles>
    <meta:generator>LibreOffice/24.2.7.2$Linux_X86_64 LibreOffice_project/420$Build-2</meta:generator>
    <meta:document-statistic meta:table-count="1" meta:cell-count="224" meta:object-count="0"/>
  </office:meta>
</office:document-meta>
</file>